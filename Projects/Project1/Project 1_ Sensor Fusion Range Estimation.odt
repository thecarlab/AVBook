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1252in" fo:margin-bottom="0.1252in" style:contextual-spacing="false" fo:orphans="2" fo:widows="2" fo:text-indent="0in" style:auto-text-indent="false"/>
      <style:text-properties fo:font-variant="normal" fo:text-transform="none" fo:color="#273540" loext:opacity="100%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/>
      <style:text-properties fo:font-variant="normal" fo:text-transform="none" fo:color="#273540" loext:opacity="100%" style:font-name="Lato Extended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/>
      <style:text-properties fo:font-variant="normal" fo:text-transform="none" fo:color="#273540" loext:opacity="100%" fo:letter-spacing="normal"/>
    </style:style>
    <style:style style:name="P4" style:family="paragraph" style:parent-style-name="Text_20_body">
      <style:paragraph-properties fo:margin-left="0.052in" fo:margin-right="0in" fo:margin-top="0.1252in" fo:margin-bottom="0.1252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273540" loext:opacity="100%" style:font-name="Lato Extended" fo:font-size="12pt" fo:letter-spacing="normal" fo:font-style="normal" fo:font-weight="normal"/>
    </style:style>
    <style:style style:name="T2" style:family="text">
      <style:text-properties fo:font-variant="normal" fo:text-transform="none" fo:color="#0e68b3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1: Sensor Fusion Range Estimation</text:h>
      <text:p text:style-name="P2">Story: You are a perception software engineer in a group at a startup called UDrive. Your group is given a piece of recorded data, including LiDAR, Camera, IMU, and GNSS Data. The recorded data is the vehicle driving in simulation around the STAR Campus.</text:p>
      <text:p text:style-name="P3"> </text:p>
      <text:p text:style-name="P2">Goal: The planning team would like to know how far the ego-vehicle (you) is from the stop sign, other vehicles, and pedestrians. They would like to obtain a local measurement in meters (x, y, z) and also a global coordinate in (latitude, longitude, altitude).</text:p>
      <text:p text:style-name="P3"> </text:p>
      <text:p text:style-name="P2">Deliverables: CPP or Python Code using ROS2 that publishes the names of detected objects, their distances in x and y, and coordinates in latitude and longitude. Write a 1-page document detailing what you did, what problems you and your group had, and a video demonstrating the results from your code. Also include a summary of individual contributions.</text:p>
      <text:p text:style-name="P3"> </text:p>
      <text:p text:style-name="P4"><text:span text:style-name="T1">The data file is located here: </text:span><text:a xlink:type="simple" xlink:href="https://drive.google.com/file/d/1zd5GGe6t-UIEEMK9XJ1UCwRFa9NWEHrm/view?usp=sharing" office:target-frame-name="_blank" xlink:show="new" text:style-name="Internet_20_link" text:visited-style-name="Visited_20_Internet_20_Link"><text:span text:style-name="T2">https://drive.google.com/file/d/1cQssa0qrnZtZ29mf_tWxtuzulfNRv9Ap/view?usp=sharing</text:span></text:a><draw:frame draw:style-name="fr1" draw:name="Frame1" text:anchor-type="char" svg:width="0.0161in" draw:z-index="0"><draw:text-box fo:min-height="0.0161in"><text:p text:style-name="Text_20_body">Links to an external site.</text:p></draw:text-box></draw:frame></text:p>
      <text:p text:style-name="P2">The transformation of the different sensors are given here:</text:p>
      <text:p text:style-name="P2">top_lidar:<text:line-break/>      pos:<text:line-break/>        x: -0.5<text:line-break/>        y: 0.0<text:line-break/>        z: 2.0<text:line-break/>      channels: "64"<text:line-break/>      pps: "1000000"<text:line-break/>      rot_freq: 10"<text:line-break/>      range: "100"<text:line-break/>      publish_topic_name: "/sensing/lidar/top/outlier_filtered/pointcloud"<text:line-break/><text:soft-page-break/>    gnss:<text:line-break/>      pos:<text:line-break/>        x: -0.9<text:line-break/>        y: 0.0<text:line-break/>        z: 1.0<text:line-break/>    imu:<text:line-break/>      pos:<text:line-break/>        x: -0.9<text:line-break/>        y: 0.0<text:line-break/>        z: 1.0<text:line-break/>    camera_front:<text:line-break/>      pos:<text:line-break/>        x: 0.5<text:line-break/>        y: 0.0<text:line-break/>        z: 2.0<text:line-break/>      publish_topic_name: "/sensing/camera/camera0/image_rect_color" 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0:39:38.470352770</meta:creation-date>
    <dc:date>2026-01-27T10:40:25.425151521</dc:date>
    <meta:editing-duration>PT47S</meta:editing-duration>
    <meta:editing-cycles>2</meta:editing-cycles>
    <meta:document-statistic meta:table-count="0" meta:image-count="0" meta:object-count="0" meta:page-count="2" meta:paragraph-count="11" meta:word-count="216" meta:character-count="1608" meta:non-whitespace-character-count="1227"/>
    <meta:generator>LibreOffice/7.3.7.2$Linux_X86_64 LibreOffice_project/30$Build-2</meta:generator>
  </office:meta>
</office:document-meta>
</file>