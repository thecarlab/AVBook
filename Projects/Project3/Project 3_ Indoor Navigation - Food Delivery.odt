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Extended" svg:font-family="'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in" fo:margin-right="0in" fo:margin-top="0.1252in" fo:margin-bottom="0.1252in" style:contextual-spacing="false" fo:orphans="2" fo:widows="2" fo:text-indent="0in" style:auto-text-indent="false"/>
      <style:text-properties fo:font-variant="normal" fo:text-transform="none" fo:color="#273540" loext:opacity="100%" style:font-name="Lato Extended" fo:font-size="12pt" fo:letter-spacing="normal" fo:font-style="normal" fo:font-weight="normal"/>
    </style:style>
    <style:style style:name="P2" style:family="paragraph" style:parent-style-name="Text_20_body">
      <style:paragraph-properties fo:margin-left="0in" fo:margin-right="0in" fo:margin-top="0.1252in" fo:margin-bottom="0.1252in" style:contextual-spacing="false" fo:orphans="2" fo:widows="2" fo:text-indent="0in" style:auto-text-indent="false"/>
      <style:text-properties fo:font-variant="normal" fo:text-transform="none" fo:color="#273540" loext:opacity="100%" style:font-name="Lato Extended" fo:font-size="12pt" fo:letter-spacing="normal" fo:font-style="normal" fo:font-weight="normal"/>
    </style:style>
    <style:style style:name="P3" style:family="paragraph" style:parent-style-name="Text_20_body" style:list-style-name="L1">
      <style:paragraph-properties fo:margin-left="0in" fo:margin-right="0in" fo:margin-top="0in" fo:margin-bottom="0.0626in" style:contextual-spacing="false" fo:orphans="2" fo:widows="2" fo:text-indent="0in" style:auto-text-indent="false" fo:padding="0in" fo:border="none"/>
      <style:text-properties fo:font-variant="normal" fo:text-transform="none" fo:color="#273540" loext:opacity="100%" style:font-name="Lato Extended" fo:font-size="12pt" fo:letter-spacing="normal" fo:font-style="normal" fo:font-weight="normal"/>
    </style:style>
    <style:style style:name="P4" style:family="paragraph" style:parent-style-name="Text_20_body" style:list-style-name="L1">
      <style:paragraph-properties fo:margin-top="0in" fo:margin-bottom="0.0626in" style:contextual-spacing="false" fo:orphans="2" fo:widows="2" fo:padding="0in" fo:border="none"/>
      <style:text-properties fo:font-variant="normal" fo:text-transform="none" fo:color="#273540" loext:opacity="100%" style:font-name="Lato Extended" fo:font-size="12pt" fo:letter-spacing="normal" fo:font-style="normal" fo:font-weight="normal"/>
    </style:style>
    <style:style style:name="P5" style:family="paragraph" style:parent-style-name="Text_20_body">
      <style:paragraph-properties fo:margin-left="0in" fo:margin-right="0in" fo:margin-top="0.1252in" fo:margin-bottom="0.1252in" style:contextual-spacing="false" fo:orphans="2" fo:widows="2" fo:text-indent="0in" style:auto-text-indent="false"/>
      <style:text-properties fo:font-variant="normal" fo:text-transform="none" fo:color="#273540" loext:opacity="100%" fo:letter-spacing="normal"/>
    </style:style>
    <text:list-style style:name="L1">
      <text:list-level-style-bullet text:level="1" text:style-name="Bullet_20_Symbols" loext:num-list-format="%1%." style:num-suffix="." text:bullet-char="•">
        <style:list-level-properties text:space-before="0.2602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ject 3: Indoor Navigation - Food Delivery </text:h>
      <text:p text:style-name="P2">Story: The team has decided to create an indoor food delivery vehicle. The testbed will be on Fintech 3rd Floor. The test vehicle will be your 1/10th vehicle, it will navigate between Rooms 301, 314, 315, 316, and the kitchen to simulate carrying different objects (cups of coffee, plates, food).</text:p>
      <text:p text:style-name="P5"> </text:p>
      <text:p text:style-name="P2">Goal: The test vehicle should be able to navigate the corridors on the 3rd Floor without hitting the walls, any pedestrians, or any obstacles that are in the way. Also, it should not spill any coffee.</text:p>
      <text:p text:style-name="P5"> </text:p>
      <text:p text:style-name="P2">Deliverables: A working code repository, a video, and a report.</text:p>
      <text:p text:style-name="P2">Hints: </text:p>
      <text:list xml:id="list2222721100" text:style-name="L1">
        <text:list-item>
          <text:p text:style-name="P3">controller code: src/pure_pursuit_controller/src/pure_pursuit_controller.cpp</text:p>
        </text:list-item>
        <text:list-item>
          <text:p text:style-name="P4">vision models: src/perception/models</text:p>
        </text:list-item>
        <text:list-item>
          <text:p text:style-name="P4">perception code: src/perception/perception/perception_node.py</text:p>
        </text:list-item>
        <text:list-item>
          <text:p text:style-name="P4">control center code: src/control_center/src/control_center_node.cpp</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Extended" svg:font-family="'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7T10:49:28.721695631</meta:creation-date>
    <dc:date>2026-01-27T10:49:51.255337069</dc:date>
    <meta:editing-duration>PT22S</meta:editing-duration>
    <meta:editing-cycles>1</meta:editing-cycles>
    <meta:document-statistic meta:table-count="0" meta:image-count="0" meta:object-count="0" meta:page-count="1" meta:paragraph-count="11" meta:word-count="121" meta:character-count="857" meta:non-whitespace-character-count="745"/>
    <meta:generator>LibreOffice/7.3.7.2$Linux_X86_64 LibreOffice_project/30$Build-2</meta:generator>
  </office:meta>
</office:document-meta>
</file>