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1252in" fo:margin-bottom="0.1252in" style:contextual-spacing="false" fo:orphans="2" fo:widows="2" fo:text-indent="0in" style:auto-text-indent="false"/>
      <style:text-properties fo:font-variant="normal" fo:text-transform="none" fo:color="#273540" loext:opacity="100%" style:font-name="Lato Extended" fo:font-size="12pt" fo:letter-spacing="normal" fo:font-style="normal" fo:font-weight="normal"/>
    </style:style>
    <style:style style:name="P2"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73540" loext:opacity="100%" style:font-name="Lato Extended" fo:font-size="12pt" fo:letter-spacing="normal" fo:font-style="normal" fo:font-weight="normal"/>
    </style:style>
    <style:style style:name="P3" style:family="paragraph" style:parent-style-name="Text_20_body">
      <style:paragraph-properties fo:margin-left="0.052in" fo:margin-right="0in" fo:margin-top="0.1252in" fo:margin-bottom="0.1252in" style:contextual-spacing="false" fo:orphans="2" fo:widows="2" fo:text-indent="0in" style:auto-text-indent="false"/>
    </style:style>
    <style:style style:name="T1" style:family="text">
      <style:text-properties fo:font-variant="normal" fo:text-transform="none" fo:color="#273540" loext:opacity="100%" style:font-name="Lato Extended" fo:font-size="12pt" fo:letter-spacing="normal" fo:font-style="normal" fo:font-weight="normal"/>
    </style:style>
    <style:style style:name="T2" style:family="text">
      <style:text-properties fo:font-variant="normal" fo:text-transform="none" fo:color="#0e68b3" loext:opacity="100%" style:font-name="Lato Extended"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2 - Mapping Indoor and Outdoor Environments </text:h>
      <text:p text:style-name="P2">Story: Thank you for the awesome work you've put into the first project. The planning team is very impressed. But the planning team has a new task for you. You are given Camera, LiDAR, IMU, GNSS data.</text:p>
      <text:p text:style-name="P2">Goal: The planning team would like you to create an outdoor and an indoor map so they can test their code with path planning and control decisions. You and your team need to create an HD-Map used for mapping and localization. You also need to map out driving areas such as driving lanes, bike lanes, signages.</text:p>
      <text:p text:style-name="P2">Deliverables: An HD-map including pointcloud data and Lanelet2 map data. HD map points should include location information for indoor/outdoor maps (local position). Include a video of the HD map's localization process. Write a 1-page document detailing what you did, what problems you and your group had. Also include a summary of individual contributions.</text:p>
      <text:p text:style-name="P3"><text:span text:style-name="T1">Data source: </text:span><text:a xlink:type="simple" xlink:href="https://drive.google.com/file/d/1hDIXa3xTEK-7ObSc0sNAT4xsiWq0DylU/view?usp=sharing" office:target-frame-name="_blank" xlink:show="new" text:style-name="Internet_20_link" text:visited-style-name="Visited_20_Internet_20_Link"><text:span text:style-name="T2">https://drive.google.com/file/d/1hDIXa3xTEK-7ObSc0sNAT4xsiWq0DylU/view?usp=sharing</text:span></text:a><draw:frame draw:style-name="fr1" draw:name="Frame1" text:anchor-type="char" svg:width="0.0161in" draw:z-index="0"><draw:text-box fo:min-height="0.0161in"><text:p text:style-name="Text_20_body">Links to an external site.</text:p></draw:text-box></draw:frame><text:span text:style-name="T1"> (Outdoor, Easy, start with this one), </text:span><text:a xlink:type="simple" xlink:href="https://drive.google.com/file/d/1h9lWrERGb-ASBo-HE_DQ6tEVfbOn_WtV/view?usp=sharing" office:target-frame-name="_blank" xlink:show="new" text:style-name="Internet_20_link" text:visited-style-name="Visited_20_Internet_20_Link"><text:span text:style-name="T2">https://drive.google.com/file/d/1h9lWrERGb-ASBo-HE_DQ6tEVfbOn_WtV/view?usp=sharing</text:span></text:a><draw:frame draw:style-name="fr1" draw:name="Frame2" text:anchor-type="char" svg:width="0.0161in" draw:z-index="1"><draw:text-box fo:min-height="0.0161in"><text:p text:style-name="Text_20_body">Links to an external site.</text:p></draw:text-box></draw:frame><text:span text:style-name="T1"> (Outdoor, Hard), Indoor data will be collected by yourself using the 1/10 vehicles (we'll do this in class together).</text:span></text:p>
      <text:p text:style-name="P3"><text:span text:style-name="T1">Sample pointcloud: </text:span><text:a xlink:type="simple" xlink:href="https://drive.google.com/file/d/1NqoYU7xGJYKCLnxc9YzCIpFEMRJYychV/view?usp=sharing" office:target-frame-name="_blank" xlink:show="new" text:style-name="Internet_20_link" text:visited-style-name="Visited_20_Internet_20_Link"><text:span text:style-name="T2">https://drive.google.com/file/d/1NqoYU7xGJYKCLnxc9YzCIpFEMRJYychV/view?usp=sharing</text:span></text:a><draw:frame draw:style-name="fr1" draw:name="Frame3" text:anchor-type="char" svg:width="0.0161in" draw:z-index="2"><draw:text-box fo:min-height="0.0161in"><text:p text:style-name="Text_20_body">Links to an external site.</text:p></draw:text-box></draw:frame><text:span text:style-name="T1"> </text:span></text:p>
      <text:p text:style-name="P3"><text:span text:style-name="T1">Sample Lanelet2: </text:span><text:a xlink:type="simple" xlink:href="https://drive.google.com/file/d/1o3aYwUI-QUiMZPoVFLcvIY9lbiRD97C3/view?usp=sharing" office:target-frame-name="_blank" xlink:show="new" text:style-name="Internet_20_link" text:visited-style-name="Visited_20_Internet_20_Link"><text:span text:style-name="T2">https://drive.google.com/file/d/1o3aYwUI-QUiMZPoVFLcvIY9lbiRD97C3/view?usp=sharing</text:span></text:a><draw:frame draw:style-name="fr1" draw:name="Frame4" text:anchor-type="char" svg:width="0.0161in" draw:z-index="3"><draw:text-box fo:min-height="0.0161in"><text:p text:style-name="Text_20_body">Links to an external site.</text:p></draw:text-box></draw:frame><text:span text:style-name="T1">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0:41:57.172276608</meta:creation-date>
    <dc:date>2026-01-27T10:42:28.326857000</dc:date>
    <meta:editing-duration>PT31S</meta:editing-duration>
    <meta:editing-cycles>1</meta:editing-cycles>
    <meta:document-statistic meta:table-count="0" meta:image-count="0" meta:object-count="0" meta:page-count="1" meta:paragraph-count="11" meta:word-count="209" meta:character-count="1557" meta:non-whitespace-character-count="1356"/>
    <meta:generator>LibreOffice/7.3.7.2$Linux_X86_64 LibreOffice_project/30$Build-2</meta:generator>
  </office:meta>
</office:document-meta>
</file>